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68cm"/>
    </style:style>
    <style:style style:name="co3" style:family="table-column">
      <style:table-column-properties fo:break-before="auto" style:column-width="3.104cm"/>
    </style:style>
    <style:style style:name="co4" style:family="table-column">
      <style:table-column-properties fo:break-before="auto" style:column-width="3.8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boolean-style style:name="N99">
      <number:boolean/>
    </number:boolean-style>
    <number:boolean-style style:name="N10099" number:language="en" number:country="US">
      <number:boolean/>
    </number:boolean-style>
    <style:style style:name="ce1" style:family="table-cell" style:parent-style-name="Default" style:data-style-name="N36"/>
    <style:style style:name="ce3" style:family="table-cell" style:parent-style-name="Default" style:data-style-name="N10099"/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1" table:number-columns-repeated="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2" table:default-cell-style-name="ce3"/>
        <table:table-row table:style-name="ro1">
          <table:table-cell table:style-name="Default"/>
          <table:table-cell table:style-name="Default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Default" office:value-type="string" calcext:value-type="string">
            <text:p>H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J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Codziennie</text:p>
          </table:table-cell>
          <table:table-cell table:style-name="Default" office:value-type="string" calcext:value-type="string">
            <text:p>Co 2 dni</text:p>
          </table:table-cell>
          <table:table-cell table:style-name="Default" office:value-type="string" calcext:value-type="string">
            <text:p>Co 3 dni</text:p>
          </table:table-cell>
          <table:table-cell table:style-name="Default" office:value-type="string" calcext:value-type="string">
            <text:p>Co 5 dni</text:p>
          </table:table-cell>
          <table:table-cell table:style-name="Default" office:value-type="string" calcext:value-type="string">
            <text:p>Co 7 dni</text:p>
          </table:table-cell>
          <table:table-cell table:style-name="Default" office:value-type="string" calcext:value-type="string">
            <text:p>Codziennie</text:p>
          </table:table-cell>
          <table:table-cell table:style-name="Default" office:value-type="string" calcext:value-type="string">
            <text:p>Co 2 dni</text:p>
          </table:table-cell>
          <table:table-cell table:style-name="Default" office:value-type="string" calcext:value-type="string">
            <text:p>Co 3 dni</text:p>
          </table:table-cell>
          <table:table-cell table:style-name="Default" office:value-type="string" calcext:value-type="string">
            <text:p>Co 5 dni</text:p>
          </table:table-cell>
          <table:table-cell table:style-name="Default" office:value-type="string" calcext:value-type="string">
            <text:p>Co 7 dni</text:p>
          </table:table-cell>
        </table:table-row>
        <table:table-row table:style-name="ro1">
          <table:table-cell office:value-type="date" office:date-value="2026-06-06" calcext:value-type="date">
            <text:p>6.06.2026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6-06-07" calcext:value-type="date">
            <text:p>7.06.2026</text:p>
          </table:table-cell>
          <table:table-cell office:value-type="boolean" office:boolean-value="true" calcext:value-type="boolean">
            <text:p>TRUE</text:p>
          </table:table-cell>
          <table:table-cell table:number-columns-repeated="9"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6-06-08" calcext:value-type="date">
            <text:p>8.06.2026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8"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6-06-09" calcext:value-type="date">
            <text:p>9.06.2026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6-06-10" calcext:value-type="date">
            <text:p>10.06.2026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8"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6-06-11" calcext:value-type="date">
            <text:p>11.06.2026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6-06-12" calcext:value-type="date">
            <text:p>12.06.2026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5" office:value-type="boolean" office:boolean-value="true" calcext:value-type="boolean">
            <text:p>TRUE</text:p>
          </table:table-cell>
        </table:table-row>
        <table:table-row table:style-name="ro1">
          <table:table-cell office:value-type="date" office:date-value="2026-06-13" calcext:value-type="date">
            <text:p>13.06.2026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6-06-14" calcext:value-type="date">
            <text:p>14.06.2026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6-06-15" calcext:value-type="date">
            <text:p>15.06.2026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6-06-16" calcext:value-type="date">
            <text:p>16.06.2026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6-06-17" calcext:value-type="date">
            <text:p>17.06.2026</text:p>
          </table:table-cell>
          <table:table-cell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6-06-18" calcext:value-type="date">
            <text:p>18.06.2026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6-06-19" calcext:value-type="date">
            <text:p>19.06.2026</text:p>
          </table:table-cell>
          <table:table-cell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date" office:date-value="2026-06-20" calcext:value-type="date">
            <text:p>20.06.2026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6-06-21" calcext:value-type="date">
            <text:p>21.06.2026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6-06-22" calcext:value-type="date">
            <text:p>22.06.2026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6-06-23" calcext:value-type="date">
            <text:p>23.06.2026</text:p>
          </table:table-cell>
          <table:table-cell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6-06-24" calcext:value-type="date">
            <text:p>24.06.2026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6-06-25" calcext:value-type="date">
            <text:p>25.06.2026</text:p>
          </table:table-cell>
          <table:table-cell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6-06-26" calcext:value-type="date">
            <text:p>26.06.2026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date" office:date-value="2026-06-27" calcext:value-type="date">
            <text:p>27.06.2026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6-06-28" calcext:value-type="date">
            <text:p>28.06.2026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6-06-29" calcext:value-type="date">
            <text:p>29.06.2026</text:p>
          </table:table-cell>
          <table:table-cell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6-06-30" calcext:value-type="date">
            <text:p>30.06.2026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6-07-01" calcext:value-type="date">
            <text:p>1.07.2026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6-07-02" calcext:value-type="date">
            <text:p>2.07.2026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6-07-03" calcext:value-type="date">
            <text:p>3.07.2026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date" office:date-value="2026-07-04" calcext:value-type="date">
            <text:p>4.07.2026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6-07-05" calcext:value-type="date">
            <text:p>5.07.2026</text:p>
          </table:table-cell>
          <table:table-cell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6-07-06" calcext:value-type="date">
            <text:p>6.07.2026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6-07-07" calcext:value-type="date">
            <text:p>7.07.2026</text:p>
          </table:table-cell>
          <table:table-cell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6-07-08" calcext:value-type="date">
            <text:p>8.07.2026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6-07-09" calcext:value-type="date">
            <text:p>9.07.2026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6-07-10" calcext:value-type="date">
            <text:p>10.07.2026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date" office:date-value="2026-07-11" calcext:value-type="date">
            <text:p>11.07.2026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6-07-12" calcext:value-type="date">
            <text:p>12.07.2026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6-07-13" calcext:value-type="date">
            <text:p>13.07.2026</text:p>
          </table:table-cell>
          <table:table-cell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6-07-14" calcext:value-type="date">
            <text:p>14.07.2026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6-07-15" calcext:value-type="date">
            <text:p>15.07.2026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6-07-16" calcext:value-type="date">
            <text:p>16.07.2026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6-07-17" calcext:value-type="date">
            <text:p>17.07.2026</text:p>
          </table:table-cell>
          <table:table-cell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1">
          <table:table-cell office:value-type="date" office:date-value="2026-07-18" calcext:value-type="date">
            <text:p>18.07.2026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6-07-19" calcext:value-type="date">
            <text:p>19.07.2026</text:p>
          </table:table-cell>
          <table:table-cell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6-07-20" calcext:value-type="date">
            <text:p>20.07.2026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6-07-21" calcext:value-type="date">
            <text:p>21.07.2026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6-07-22" calcext:value-type="date">
            <text:p>22.07.2026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6-07-23" calcext:value-type="date">
            <text:p>23.07.2026</text:p>
          </table:table-cell>
          <table:table-cell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6-07-24" calcext:value-type="date">
            <text:p>24.07.2026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date" office:date-value="2026-07-25" calcext:value-type="date">
            <text:p>25.07.2026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6-07-26" calcext:value-type="date">
            <text:p>26.07.2026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6-07-27" calcext:value-type="date">
            <text:p>27.07.2026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6-07-28" calcext:value-type="date">
            <text:p>28.07.2026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6-07-29" calcext:value-type="date">
            <text:p>29.07.2026</text:p>
          </table:table-cell>
          <table:table-cell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6-07-30" calcext:value-type="date">
            <text:p>30.07.2026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6-07-31" calcext:value-type="date">
            <text:p>31.07.2026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date" office:date-value="2026-08-01" calcext:value-type="date">
            <text:p>1.08.2026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6-08-02" calcext:value-type="date">
            <text:p>2.08.2026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6-08-03" calcext:value-type="date">
            <text:p>3.08.2026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6-08-04" calcext:value-type="date">
            <text:p>4.08.2026</text:p>
          </table:table-cell>
          <table:table-cell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6-08-05" calcext:value-type="date">
            <text:p>5.08.2026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6-08-06" calcext:value-type="date">
            <text:p>6.08.2026</text:p>
          </table:table-cell>
          <table:table-cell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6-08-07" calcext:value-type="date">
            <text:p>7.08.2026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date" office:date-value="2026-08-08" calcext:value-type="date">
            <text:p>8.08.2026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6-08-09" calcext:value-type="date">
            <text:p>9.08.2026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6-08-10" calcext:value-type="date">
            <text:p>10.08.2026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6-08-11" calcext:value-type="date">
            <text:p>11.08.2026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6-08-12" calcext:value-type="date">
            <text:p>12.08.2026</text:p>
          </table:table-cell>
          <table:table-cell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6-08-13" calcext:value-type="date">
            <text:p>13.08.2026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6-08-14" calcext:value-type="date">
            <text:p>14.08.2026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date" office:date-value="2026-08-15" calcext:value-type="date">
            <text:p>15.08.2026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6-08-16" calcext:value-type="date">
            <text:p>16.08.2026</text:p>
          </table:table-cell>
          <table:table-cell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6-08-17" calcext:value-type="date">
            <text:p>17.08.2026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6-08-18" calcext:value-type="date">
            <text:p>18.08.2026</text:p>
          </table:table-cell>
          <table:table-cell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6-08-19" calcext:value-type="date">
            <text:p>19.08.2026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6-08-20" calcext:value-type="date">
            <text:p>20.08.2026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6-08-21" calcext:value-type="date">
            <text:p>21.08.2026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1">
          <table:table-cell office:value-type="date" office:date-value="2026-08-22" calcext:value-type="date">
            <text:p>22.08.2026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11"/>
        </table:table-row>
        <table:table-row table:style-name="ro1" table:number-rows-repeated="4">
          <table:table-cell table:style-name="Default" table:number-columns-repeated="6"/>
          <table:table-cell table:style-name="ce2" table:number-columns-repeated="3"/>
          <table:table-cell table:style-name="Default" table:number-columns-repeated="2"/>
        </table:table-row>
        <table:table-row table:style-name="ro1" table:number-rows-repeated="4">
          <table:table-cell table:style-name="Default" table:number-columns-repeated="6"/>
          <table:table-cell table:style-name="ce2"/>
          <table:table-cell table:style-name="Default"/>
          <table:table-cell table:style-name="ce2"/>
          <table:table-cell table:style-name="Default" table:number-columns-repeated="2"/>
        </table:table-row>
        <table:table-row table:style-name="ro1" table:number-rows-repeated="9">
          <table:table-cell table:style-name="Default" table:number-columns-repeated="8"/>
          <table:table-cell table:style-name="ce2"/>
          <table:table-cell table:style-name="Default" table:number-columns-repeated="2"/>
        </table:table-row>
        <table:table-row table:style-name="ro1">
          <table:table-cell table:style-name="Default" table:number-columns-repeated="8"/>
          <table:table-cell table:style-name="ce2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5">00.00.0000</text:date>, <text:time style:data-style-name="N2" text:time-value="22:29:19.554061014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5T22:01:42.939348349</meta:creation-date>
    <dc:date>2026-07-05T23:21:30.606046172</dc:date>
    <meta:editing-duration>PT57M7S</meta:editing-duration>
    <meta:editing-cycles>4</meta:editing-cycles>
    <meta:generator>LibreOffice/25.2.3.2$Linux_X86_64 LibreOffice_project/520$Build-2</meta:generator>
    <meta:document-statistic meta:table-count="1" meta:cell-count="878" meta:object-count="0"/>
  </office:meta>
</office:document-meta>
</file>